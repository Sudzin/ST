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420000000C664F85B8713E9F1D.png" manifest:media-type="image/png"/>
  <manifest:file-entry manifest:full-path="Pictures/100000010000077E000002F4B20916687E41E061.png" manifest:media-type="image/png"/>
  <manifest:file-entry manifest:full-path="Pictures/1000000100000288000002049FEFCEA29ED5F8D4.png" manifest:media-type="image/png"/>
  <manifest:file-entry manifest:full-path="Pictures/100000010000078000000371CFE50DDC3B1B9BBF.png" manifest:media-type="image/png"/>
  <manifest:file-entry manifest:full-path="Pictures/100000010000078000000299E68DD64AE287B6D4.png" manifest:media-type="image/png"/>
  <manifest:file-entry manifest:full-path="Pictures/10000001000007800000034AFA7A5069F12B2344.png" manifest:media-type="image/png"/>
  <manifest:file-entry manifest:full-path="Pictures/100000010000078000000358035BFDDE2CF11E9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2.629cm"/>
      <style:paragraph-properties style:writing-mode="lr-tb"/>
    </style:style>
    <style:style style:name="pr2" style:family="presentation" style:parent-style-name="Обычный-subtitle">
      <style:graphic-properties draw:fill-color="#ffffff" fo:min-height="3.149cm"/>
      <style:paragraph-properties style:writing-mode="lr-tb"/>
    </style:style>
    <style:style style:name="pr3" style:family="presentation" style:parent-style-name="Обычный-subtitle">
      <style:graphic-properties draw:fill-color="#ffffff" fo:min-height="1cm"/>
      <style:paragraph-properties style:writing-mode="lr-tb"/>
    </style:style>
    <style:style style:name="pr4" style:family="presentation" style:parent-style-name="Обычный-notes">
      <style:graphic-properties draw:fill-color="#ffffff" fo:min-height="13.364cm"/>
      <style:paragraph-properties style:writing-mode="lr-tb"/>
    </style:style>
    <style:style style:name="pr5" style:family="presentation" style:parent-style-name="Обычный-outline1">
      <style:graphic-properties fo:min-height="8.884cm"/>
      <style:paragraph-properties style:writing-mode="lr-tb"/>
    </style:style>
    <style:style style:name="P1" style:family="paragraph">
      <style:paragraph-properties fo:margin-top="1.1cm" fo:margin-bottom="0.5cm" fo:line-height="150%"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paragraph-properties fo:text-align="start"/>
      <style:text-properties fo:font-size="20pt" style:font-size-asian="20pt" style:font-size-complex="20pt"/>
    </style:style>
    <style:style style:name="P4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5" style:family="paragraph">
      <loext:graphic-properties draw:fill-color="#ffffff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paragraph-properties fo:text-align="center"/>
    </style:style>
    <style:style style:name="P8" style:family="paragraph">
      <style:paragraph-properties fo:margin-top="0.5cm" fo:margin-bottom="0cm" fo:text-align="center"/>
      <style:text-properties fo:font-size="44pt" style:font-size-asian="44pt" style:font-size-complex="44pt"/>
    </style:style>
    <style:style style:name="P9" style:family="paragraph">
      <style:text-properties fo:font-size="44pt" style:font-size-asian="44pt" style:font-size-complex="44pt"/>
    </style:style>
    <style:style style:name="P10" style:family="paragraph">
      <style:paragraph-properties fo:margin-top="0.5cm" fo:margin-bottom="0cm" fo:text-align="center"/>
      <style:text-properties fo:font-size="32pt" style:font-size-asian="32pt" style:font-size-complex="32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paragraph-properties fo:text-align="justify"/>
      <style:text-properties fo:font-size="16pt" style:font-size-asian="16pt" style:font-size-complex="16pt"/>
    </style:style>
    <style:style style:name="P13" style:family="paragraph">
      <style:paragraph-properties fo:margin-top="0.5cm" fo:margin-bottom="0cm"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2" draw:layer="layout" svg:width="25.199cm" svg:height="7.813cm" svg:x="1.301cm" svg:y="1.036cm" presentation:class="title" presentation:user-transformed="true">
          <draw:text-box>
            <text:p text:style-name="P1"><text:span text:style-name="T1">МИНИСТЕРСТВО НАУКИ И ВЫСШЕГО ОБРАЗОВАНИЯ РОССИЙСКОЙ ФЕДЕРАЦИИ</text:span><text:span text:style-name="T1"><text:line-break/></text:span><text:span text:style-name="T1">ПЕНЗЕНСКИЙ ГОСУДАРСТВЕННЫЙ УНИВЕРСИТЕТ</text:span><text:span text:style-name="T1"><text:line-break/></text:span><text:span text:style-name="T1">Кафедра «Информационная <text:s/>безопасность систем и технологий»</text:span><text:span text:style-name="T1"><text:line-break/></text:span><text:span text:style-name="T1">Курсовая работа по дисциплине «Сетевые технологии»</text:span><text:span text:style-name="T1"><text:line-break/></text:span><text:span text:style-name="T1">на тему «Разработка приложений с сетевым взаимодействием»</text:span></text:p>
          </draw:text-box>
        </draw:frame>
        <draw:frame presentation:style-name="pr2" draw:text-style-name="P4" draw:layer="layout" svg:width="12cm" svg:height="3.149cm" svg:x="15.5cm" svg:y="10cm" presentation:class="subtitle" presentation:user-transformed="true">
          <draw:text-box>
            <text:p text:style-name="P3"><text:span text:style-name="T2">Группа: 22ПТ1</text:span></text:p>
            <text:p text:style-name="P3"><text:span text:style-name="T2">Выполнил: Мочалин А.А.</text:span></text:p>
            <text:p text:style-name="P3"><text:span text:style-name="T2">Проверил: старший преподаватель</text:span></text:p>
            <text:p text:style-name="P3"><text:span text:style-name="T2">Щербакова А.Ю.</text:span></text:p>
          </draw:text-box>
        </draw:frame>
        <draw:frame presentation:style-name="pr3" draw:text-style-name="P4" draw:layer="layout" svg:width="4cm" svg:height="1cm" svg:x="13cm" svg:y="14cm">
          <draw:text-box>
            <text:p text:style-name="P3"><text:span text:style-name="T2">Пенза 2026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Цели и задачи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3">
              <text:list-header>
                <text:p text:style-name="P6"><text:span text:style-name="T2">Целью курсовой работы является разработка сетевого приложения с архитектурой клиент-сервер</text:span></text:p>
                <text:p text:style-name="P6"><text:span text:style-name="T2">К задачам курсовой работы относятся:</text:span></text:p>
                <text:p text:style-name="P6"><text:span text:style-name="T2"><text:s text:c="4"/></text:span><text:span text:style-name="T2">1. Разработка протокола прикладного уровня</text:span></text:p>
                <text:p text:style-name="P6"><text:span text:style-name="T2"><text:s text:c="4"/></text:span><text:span text:style-name="T2">2. Программная реализация приложения</text:span></text:p>
                <text:p text:style-name="P6"><text:span text:style-name="T2"><text:s text:c="4"/></text:span><text:span text:style-name="T2">3. Проверка работоспособности</text:span></text:p>
                <text:p text:style-name="P6"><text:span text:style-name="T2"><text:s text:c="4"/></text:span><text:span text:style-name="T2">4. Разработка руководства пользователя</text:span></text:p>
              </text:list-header>
            </text:list>
          </draw:text-box>
        </draw:frame>
        <draw:frame draw:style-name="gr2" draw:text-style-name="P7" draw:layer="layout" svg:width="27.999cm" svg:height="0.248cm" svg:x="0.002cm" svg:y="15.5cm">
          <draw:image xlink:href="Pictures/10000001000005420000000C664F85B8713E9F1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text-style-name="P9" draw:layer="layout" svg:width="25.199cm" svg:height="3.473cm" svg:x="1.301cm" svg:y="6cm" presentation:class="title" presentation:user-transformed="true">
          <draw:text-box>
            <text:list text:style-name="L4">
              <text:list-header>
                <text:p text:style-name="P8"><text:span text:style-name="T3">Разработка протокола прикладного уровня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1" draw:text-style-name="P11" draw:layer="layout" svg:width="25.199cm" svg:height="2.629cm" svg:x="1.5cm" svg:y="0.634cm" presentation:class="title" presentation:user-transformed="true">
          <draw:text-box>
            <text:list text:style-name="L4">
              <text:list-header>
                <text:p text:style-name="P10"><text:span text:style-name="T4">Разработка протокола прикладного уровня</text:span></text:p>
              </text:list-header>
            </text:list>
          </draw:text-box>
        </draw:frame>
        <draw:frame presentation:style-name="pr5" draw:text-style-name="P12" draw:layer="layout" svg:width="10.599cm" svg:height="11cm" svg:x="16cm" svg:y="3cm" presentation:class="outline" presentation:user-transformed="true">
          <draw:text-box>
            <text:p text:style-name="P12"><text:span text:style-name="T5">Протокол использует бинарный формат пакетов.</text:span></text:p>
            <text:p text:style-name="P12"><text:span text:style-name="T5">Первый байт каждого сообщения сообщает серверу, что делать с данным пакетом.</text:span></text:p>
            <text:p text:style-name="P12"><text:span text:style-name="T5">Перед соединением с сервером клиент должен пройти аутентификацию.</text:span></text:p>
            <text:p text:style-name="P12"><text:span text:style-name="T5">После установления соединения клиент может отправлять файл. Передача осуществляется поэтапно: сначала отправляются имя файла и его размер, далее он разбивается на сегменты и передаётся на клиент, последним этапом отправки является сообщение с завершением отправки.</text:span></text:p>
          </draw:text-box>
        </draw:frame>
        <draw:frame draw:style-name="gr2" draw:text-style-name="P7" draw:layer="layout" svg:width="14cm" svg:height="11.148cm" svg:x="1.5cm" svg:y="3cm">
          <draw:image xlink:href="Pictures/1000000100000288000002049FEFCEA29ED5F8D4.png" xlink:type="simple" xlink:show="embed" xlink:actuate="onLoad" draw:mime-type="image/png">
            <text:p/>
          </draw:image>
        </draw:frame>
        <draw:frame draw:style-name="gr2" draw:text-style-name="P7" draw:layer="layout" svg:width="27.999cm" svg:height="0.248cm" svg:x="0.002cm" svg:y="15.5cm">
          <draw:image xlink:href="Pictures/10000001000005420000000C664F85B8713E9F1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1" draw:text-style-name="P9" draw:layer="layout" svg:width="25.199cm" svg:height="3.473cm" svg:x="1.301cm" svg:y="6cm" presentation:class="title" presentation:user-transformed="true">
          <draw:text-box>
            <text:list text:style-name="L4">
              <text:list-header>
                <text:p text:style-name="P8"><text:span text:style-name="T3">Программная реализация приложения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1" draw:text-style-name="P11" draw:layer="layout" svg:width="25.199cm" svg:height="2.629cm" svg:x="1.4cm" svg:y="0.628cm" presentation:class="title" presentation:user-transformed="true">
          <draw:text-box>
            <text:list text:style-name="L4">
              <text:list-header>
                <text:p text:style-name="P10"><text:span text:style-name="T4">Программная реализация приложения</text:span></text:p>
              </text:list-header>
            </text:list>
          </draw:text-box>
        </draw:frame>
        <draw:frame draw:style-name="gr2" draw:text-style-name="P7" draw:layer="layout" svg:width="27.999cm" svg:height="9.701cm" svg:x="0.062cm" svg:y="2.799cm">
          <draw:image xlink:href="Pictures/100000010000078000000299E68DD64AE287B6D4.png" xlink:type="simple" xlink:show="embed" xlink:actuate="onLoad" draw:mime-type="image/png">
            <text:p/>
          </draw:image>
        </draw:frame>
        <draw:frame draw:style-name="gr2" draw:text-style-name="P7" draw:layer="layout" svg:width="27.999cm" svg:height="0.248cm" svg:x="0.001cm" svg:y="15.5cm">
          <draw:image xlink:href="Pictures/10000001000005420000000C664F85B8713E9F1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1" draw:text-style-name="P9" draw:layer="layout" svg:width="25.199cm" svg:height="2.629cm" svg:x="1.5cm" svg:y="6.371cm" presentation:class="title" presentation:user-transformed="true">
          <draw:text-box>
            <text:list text:style-name="L4">
              <text:list-header>
                <text:p text:style-name="P8"><text:span text:style-name="T3">Проверка работоспособности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presentation:style-name="pr1" draw:text-style-name="P11" draw:layer="layout" svg:width="25.199cm" svg:height="2.629cm" svg:x="1.4cm" svg:y="0.628cm" presentation:class="title" presentation:user-transformed="true">
          <draw:text-box>
            <text:list text:style-name="L4">
              <text:list-header>
                <text:p text:style-name="P10"><text:span text:style-name="T4">Проверка работоспособности</text:span></text:p>
              </text:list-header>
            </text:list>
          </draw:text-box>
        </draw:frame>
        <draw:frame draw:style-name="gr2" draw:text-style-name="P7" draw:layer="layout" svg:width="27.999cm" svg:height="12.851cm" svg:x="0.062cm" svg:y="2.5cm">
          <draw:image xlink:href="Pictures/100000010000078000000371CFE50DDC3B1B9BBF.png" xlink:type="simple" xlink:show="embed" xlink:actuate="onLoad" draw:mime-type="image/png">
            <text:p/>
          </draw:image>
        </draw:frame>
        <draw:frame draw:style-name="gr2" draw:text-style-name="P7" draw:layer="layout" svg:width="27.999cm" svg:height="0.248cm" svg:x="0.002cm" svg:y="15.5cm">
          <draw:image xlink:href="Pictures/10000001000005420000000C664F85B8713E9F1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1" draw:text-style-name="P9" draw:layer="layout" svg:width="25.199cm" svg:height="3.473cm" svg:x="1.5cm" svg:y="6.027cm" presentation:class="title" presentation:user-transformed="true">
          <draw:text-box>
            <text:list text:style-name="L4">
              <text:list-header>
                <text:p text:style-name="P8"><text:span text:style-name="T3">Разработка руководства пользователя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1" draw:text-style-name="P11" draw:layer="layout" svg:width="25.199cm" svg:height="2.629cm" svg:x="1.4cm" svg:y="0.628cm" presentation:class="title" presentation:user-transformed="true">
          <draw:text-box>
            <text:list text:style-name="L4">
              <text:list-header>
                <text:p text:style-name="P10"><text:span text:style-name="T4">Разработка руководства пользователя</text:span></text:p>
              </text:list-header>
            </text:list>
          </draw:text-box>
        </draw:frame>
        <draw:frame draw:style-name="gr2" draw:text-style-name="P7" draw:layer="layout" svg:width="27.999cm" svg:height="12.288cm" svg:x="0.062cm" svg:y="2.712cm">
          <draw:image xlink:href="Pictures/10000001000007800000034AFA7A5069F12B2344.png" xlink:type="simple" xlink:show="embed" xlink:actuate="onLoad" draw:mime-type="image/png">
            <text:p/>
          </draw:image>
        </draw:frame>
        <draw:frame draw:style-name="gr2" draw:text-style-name="P7" draw:layer="layout" svg:width="27.999cm" svg:height="0.248cm" svg:x="0.003cm" svg:y="15.5cm">
          <draw:image xlink:href="Pictures/10000001000005420000000C664F85B8713E9F1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list text:style-name="L4">
              <text:list-header>
                <text:p text:style-name="P13"><text:span text:style-name="T4">Разработка руководства пользователя</text:span></text:p>
              </text:list-header>
            </text:list>
          </draw:text-box>
        </draw:frame>
        <draw:frame draw:style-name="gr2" draw:text-style-name="P7" draw:layer="layout" svg:width="27.999cm" svg:height="0.248cm" svg:x="0.003cm" svg:y="15.5cm">
          <draw:image xlink:href="Pictures/10000001000005420000000C664F85B8713E9F1D.png" xlink:type="simple" xlink:show="embed" xlink:actuate="onLoad" draw:mime-type="image/png">
            <text:p/>
          </draw:image>
        </draw:frame>
        <draw:frame draw:style-name="gr2" draw:text-style-name="P7" draw:layer="layout" svg:width="27.999cm" svg:height="11.031cm" svg:x="0.001cm" svg:y="3cm">
          <draw:image xlink:href="Pictures/100000010000077E000002F4B20916687E41E06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list text:style-name="L4">
              <text:list-header>
                <text:p text:style-name="P13"><text:span text:style-name="T4">Разработка руководства пользователя</text:span></text:p>
              </text:list-header>
            </text:list>
          </draw:text-box>
        </draw:frame>
        <draw:frame draw:style-name="gr2" draw:text-style-name="P7" draw:layer="layout" svg:width="27.999cm" svg:height="0.248cm" svg:x="0.004cm" svg:y="15.5cm">
          <draw:image xlink:href="Pictures/10000001000005420000000C664F85B8713E9F1D.png" xlink:type="simple" xlink:show="embed" xlink:actuate="onLoad" draw:mime-type="image/png">
            <text:p/>
          </draw:image>
        </draw:frame>
        <draw:frame draw:style-name="gr2" draw:text-style-name="P7" draw:layer="layout" svg:width="27.999cm" svg:height="12.482cm" svg:x="0.062cm" svg:y="3cm">
          <draw:image xlink:href="Pictures/100000010000078000000358035BFDDE2CF11E9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1T0">
        <draw:frame presentation:style-name="pr1" draw:text-style-name="P2" draw:layer="layout" svg:width="25.199cm" svg:height="7.813cm" svg:x="1.301cm" svg:y="1.036cm" presentation:class="title" presentation:user-transformed="true">
          <draw:text-box>
            <text:p text:style-name="P1"><text:span text:style-name="T1">МИНИСТЕРСТВО НАУКИ И ВЫСШЕГО ОБРАЗОВАНИЯ РОССИЙСКОЙ ФЕДЕРАЦИИ</text:span><text:span text:style-name="T1"><text:line-break/></text:span><text:span text:style-name="T1">ПЕНЗЕНСКИЙ ГОСУДАРСТВЕННЫЙ УНИВЕРСИТЕТ</text:span><text:span text:style-name="T1"><text:line-break/></text:span><text:span text:style-name="T1">Кафедра «Информационная <text:s/>безопасность систем и технологий»</text:span><text:span text:style-name="T1"><text:line-break/></text:span><text:span text:style-name="T1">Курсовая работа по дисциплине «Сетевые технологии»</text:span><text:span text:style-name="T1"><text:line-break/></text:span><text:span text:style-name="T1">на тему «Разработка приложений с сетевым взаимодействием»</text:span></text:p>
          </draw:text-box>
        </draw:frame>
        <draw:frame presentation:style-name="pr2" draw:text-style-name="P4" draw:layer="layout" svg:width="12cm" svg:height="3.149cm" svg:x="15.5cm" svg:y="10cm" presentation:class="subtitle" presentation:user-transformed="true">
          <draw:text-box>
            <text:p text:style-name="P3"><text:span text:style-name="T2">Группа: 22ПТ1</text:span></text:p>
            <text:p text:style-name="P3"><text:span text:style-name="T2">Выполнил: Мочалин А.А.</text:span></text:p>
            <text:p text:style-name="P3"><text:span text:style-name="T2">Проверил: старший преподаватель</text:span></text:p>
            <text:p text:style-name="P3"><text:span text:style-name="T2">Щербакова А.Ю.</text:span></text:p>
          </draw:text-box>
        </draw:frame>
        <draw:frame presentation:style-name="pr3" draw:text-style-name="P4" draw:layer="layout" svg:width="4cm" svg:height="1cm" svg:x="13cm" svg:y="14cm">
          <draw:text-box>
            <text:p text:style-name="P3"><text:span text:style-name="T2">Пенза 2026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6-03-17T22:28:52.796000000</meta:creation-date>
    <dc:date>2026-03-17T23:28:03.148000000</dc:date>
    <meta:editing-duration>PT48M57S</meta:editing-duration>
    <meta:editing-cycles>7</meta:editing-cycles>
    <meta:generator>LibreOffice/7.2.1.2$Windows_X86_64 LibreOffice_project/87b77fad49947c1441b67c559c339af8f3517e22</meta:generator>
    <meta:document-statistic meta:object-count="79"/>
  </office:meta>
</office:document-meta>
</file>