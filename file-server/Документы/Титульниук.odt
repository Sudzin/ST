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d664a"/>
    </style:style>
    <style:style style:name="P2" style:family="paragraph" style:parent-style-name="ГОСТ_5f_нумерованный_5f_Танасов" style:list-style-name="ГОСТ_5f_многоуровневый_5f_Танасов">
      <style:text-properties officeooo:paragraph-rsid="025b5fab"/>
    </style:style>
    <style:style style:name="P3" style:family="paragraph" style:parent-style-name="ГОСТ_5f_основной_5f_текст_5f_Танасов" style:list-style-name="ГОСТ_5f_многоуровневый_5f_Танасов">
      <style:text-properties officeooo:paragraph-rsid="01d9eb7e"/>
    </style:style>
    <style:style style:name="P4" style:family="paragraph" style:parent-style-name="ГОСТ_5f_основной_5f_текст_5f_Танасов" style:list-style-name="ГОСТ_5f_многоуровневый_5f_Танасов">
      <style:text-properties officeooo:rsid="01bc87e0" officeooo:paragraph-rsid="01bc87e0"/>
    </style:style>
    <style:style style:name="P5" style:family="paragraph" style:parent-style-name="ГОСТ_5f_основной_5f_текст_5f_Танасов" style:master-page-name="ГОСТ_5f_Титульная_20_страница_5f_Танасов">
      <style:paragraph-properties fo:text-align="center" style:justify-single-word="false" style:page-number="auto"/>
      <style:text-properties officeooo:paragraph-rsid="00698c62" fo:background-color="transparent"/>
    </style:style>
    <style:style style:name="P6" style:family="paragraph" style:parent-style-name="ГОСТ_5f_основной_5f_текст_5f_Танасов">
      <style:paragraph-properties fo:text-align="center" style:justify-single-word="false"/>
      <style:text-properties officeooo:paragraph-rsid="00698c62" fo:background-color="transparent"/>
    </style:style>
    <style:style style:name="P7" style:family="paragraph" style:parent-style-name="ГОСТ_5f_основной_5f_текст_5f_Танасов">
      <style:paragraph-properties fo:margin-left="0cm" fo:margin-right="0cm" fo:text-align="center" style:justify-single-word="false" fo:text-indent="0cm" style:auto-text-indent="false"/>
      <style:text-properties officeooo:paragraph-rsid="00698c62" fo:background-color="transparent"/>
    </style:style>
    <style:style style:name="P8" style:family="paragraph" style:parent-style-name="ГОСТ_5f_основной_5f_текст_5f_Танасов">
      <style:paragraph-properties fo:text-align="center" style:justify-single-word="false"/>
      <style:text-properties officeooo:paragraph-rsid="0097f04a" fo:background-color="transparent"/>
    </style:style>
    <style:style style:name="P9" style:family="paragraph" style:parent-style-name="ГОСТ_5f_основной_5f_текст_5f_Танасов">
      <style:paragraph-properties fo:text-align="center" style:justify-single-word="false"/>
      <style:text-properties fo:background-color="transparent"/>
    </style:style>
    <style:style style:name="P10" style:family="paragraph" style:parent-style-name="ГОСТ_5f_основной_5f_текст_5f_Танасов">
      <style:paragraph-properties fo:text-align="center" style:justify-single-word="false"/>
      <style:text-properties officeooo:paragraph-rsid="009c9c5b" fo:background-color="transparent"/>
    </style:style>
    <style:style style:name="P11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1b68848" fo:background-color="transparent"/>
    </style:style>
    <style:style style:name="P12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0698c62" fo:background-color="transparent"/>
    </style:style>
    <style:style style:name="P13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0db45ae" fo:background-color="transparent"/>
    </style:style>
    <style:style style:name="P14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rsid="00db45ae" officeooo:paragraph-rsid="00db45ae" fo:background-color="transparent"/>
    </style:style>
    <style:style style:name="P15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rsid="00db45ae" officeooo:paragraph-rsid="00db45ae" fo:background-color="transparent"/>
    </style:style>
    <style:style style:name="P16" style:family="paragraph" style:parent-style-name="ГОСТ_5f_основной_5f_текст_5f_Танасов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rsid="00db45ae" officeooo:paragraph-rsid="02e607b8" fo:background-color="transparent"/>
    </style:style>
    <style:style style:name="P17" style:family="paragraph" style:parent-style-name="ГОСТ_5f_основной_5f_текст_5f_Танасов">
      <style:paragraph-properties fo:text-align="center" style:justify-single-word="false"/>
      <style:text-properties style:font-name="Times New Roman" fo:font-size="14pt" fo:language="ru" fo:country="RU" fo:font-style="normal" officeooo:paragraph-rsid="02e607b8" fo:background-color="#ffff00" style:font-style-asian="normal" style:font-style-complex="normal"/>
    </style:style>
    <style:style style:name="P18" style:family="paragraph" style:parent-style-name="ГОСТ_5f_основной_5f_текст_5f_Танасов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ru" fo:country="RU" officeooo:rsid="02e607b8" officeooo:paragraph-rsid="02e607b8" fo:background-color="transparent"/>
    </style:style>
    <style:style style:name="P19" style:family="paragraph" style:parent-style-name="ГОСТ_5f_основной_5f_текст_5f_Танасов">
      <style:paragraph-properties fo:text-align="center" style:justify-single-word="false"/>
      <style:text-properties fo:language="ru" fo:country="RU" officeooo:rsid="00db45ae" officeooo:paragraph-rsid="00db45ae" fo:background-color="transparent"/>
    </style:style>
    <style:style style:name="T1" style:family="text">
      <style:text-properties officeooo:rsid="006ae1e3"/>
    </style:style>
    <style:style style:name="T2" style:family="text">
      <style:text-properties officeooo:rsid="023733bf" fo:background-color="#ffff00" loext:char-shading-value="0"/>
    </style:style>
    <style:style style:name="T3" style:family="text">
      <style:text-properties officeooo:rsid="02dd312f" fo:background-color="#ffff00" loext:char-shading-value="0"/>
    </style:style>
    <style:style style:name="T4" style:family="text">
      <style:text-properties officeooo:rsid="02e607b8" fo:background-color="#ffff00" loext:char-shading-value="0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officeooo:rsid="00801271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db45ae" fo:background-color="transparent" loext:char-shading-value="0"/>
    </style:style>
    <style:style style:name="T9" style:family="text">
      <style:text-properties officeooo:rsid="02e607b8" fo:background-color="transparent" loext:char-shading-value="0"/>
    </style:style>
    <style:style style:name="T10" style:family="text">
      <style:text-properties officeooo:rsid="00db45ae"/>
    </style:style>
    <style:style style:name="T11" style:family="text">
      <style:text-properties officeooo:rsid="01b423af"/>
    </style:style>
    <style:style style:name="T12" style:family="text">
      <style:text-properties officeooo:rsid="01b6a1a3"/>
    </style:style>
    <style:style style:name="T13" style:family="text">
      <style:text-properties fo:language="ru" fo:country="RU" officeooo:rsid="02392f1d"/>
    </style:style>
    <style:style style:name="T14" style:family="text">
      <style:text-properties fo:language="ru" fo:country="RU" fo:font-style="normal" officeooo:rsid="02dd312f" fo:background-color="#ffff00" loext:char-shading-value="0" style:font-style-asian="normal" style:font-style-complex="normal"/>
    </style:style>
    <style:style style:name="T15" style:family="text">
      <style:text-properties fo:language="ru" fo:country="RU" fo:font-style="normal" officeooo:rsid="02e607b8" fo:background-color="#ffff00" loext:char-shading-value="0" style:font-style-asian="normal" style:font-style-complex="normal"/>
    </style:style>
    <style:style style:name="T16" style:family="text">
      <style:text-properties fo:language="ru" fo:country="RU" officeooo:rsid="02392f1d" fo:background-color="#ffff00" loext:char-shading-value="0"/>
    </style:style>
    <style:style style:name="T17" style:family="text">
      <style:text-properties officeooo:rsid="01e82494"/>
    </style:style>
    <style:style style:name="T18" style:family="text">
      <style:text-properties officeooo:rsid="02332f4c"/>
    </style:style>
    <style:style style:name="T19" style:family="text">
      <style:text-properties officeooo:rsid="02392f1d"/>
    </style:style>
    <style:style style:name="T20" style:family="text">
      <style:text-properties officeooo:rsid="02ac312d"/>
    </style:style>
    <style:style style:name="T21" style:family="text">
      <style:text-properties officeooo:rsid="02dd312f"/>
    </style:style>
    <style:style style:name="T22" style:family="text">
      <style:text-properties officeooo:rsid="01d9eb7e"/>
    </style:style>
    <style:style style:name="T23" style:family="text">
      <style:text-properties officeooo:rsid="02e607b8"/>
    </style:style>
    <style:style style:name="T24" style:family="text">
      <style:text-properties style:font-name="Times New Roman" fo:font-size="14pt" officeooo:rsid="02e607b8" fo:background-color="#ffff00" loext:char-shading-value="0"/>
    </style:style>
    <style:style style:name="T25" style:family="text">
      <style:text-properties style:font-name="Times New Roman" fo:font-size="14pt" officeooo:rsid="02e607b8"/>
    </style:style>
    <style:style style:name="T26" style:family="text">
      <style:text-properties style:font-name="Times New Roman" fo:font-size="14pt" officeooo:rsid="02eba662"/>
    </style:style>
    <style:style style:name="T27" style:family="text">
      <style:text-properties fo:font-style="normal" officeooo:rsid="02e607b8" style:font-style-asian="normal" style:font-style-complex="normal"/>
    </style:style>
    <style:style style:name="T28" style:family="text">
      <style:text-properties fo:font-style="normal" officeooo:rsid="02e607b8" style:font-style-asian="normal" style:font-style-complex="normal"/>
    </style:style>
    <style:style style:name="T29" style:family="text">
      <style:text-properties fo:font-style="normal" officeooo:rsid="02e607b8" fo:background-color="transparent" loext:char-shading-value="0" style:font-style-asian="normal" style:font-style-complex="normal"/>
    </style:style>
    <style:style style:name="T30" style:family="text">
      <style:text-properties fo:font-style="normal" officeooo:rsid="02e607b8" fo:background-color="transparent" loext:char-shading-value="0" style:font-style-asian="normal" style:font-style-complex="normal"/>
    </style:style>
    <style:style style:name="T31" style:family="text">
      <style:text-properties fo:font-style="normal" officeooo:rsid="02eba662" fo:background-color="transparent" loext:char-shading-value="0" style:font-style-asian="normal" style:font-style-complex="normal"/>
    </style:style>
    <style:style style:name="T32" style:family="text">
      <style:text-properties officeooo:rsid="02e7a893"/>
    </style:style>
    <style:style style:name="T33" style:family="text">
      <style:text-properties officeooo:rsid="02eba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 </text:p>
      <text:p text:style-name="P6"/>
      <text:p text:style-name="P6">ПЕНЗЕНСКИЙ ГОСУДАРСТВЕННЫЙ УНИВЕРСИТЕТ </text:p>
      <text:p text:style-name="P6"/>
      <text:p text:style-name="P7"/>
      <text:p text:style-name="P6">Кафедра «<text:span text:style-name="T1">Информационной безопасности систем и </text:span><text:span text:style-name="T20">технологий</text:span>» </text:p>
      <text:p text:style-name="P8"><text:span text:style-name="T5"/></text:p>
      <text:p text:style-name="P19"/>
      <text:p text:style-name="P19"/>
      <text:p text:style-name="P19">О<text:span text:style-name="T11">ТЧЁТ</text:span></text:p>
      <text:p text:style-name="P17"><text:span text:style-name="Emphasis"><text:span text:style-name="T30">о выполнении этапа курсовой работы №</text:span></text:span><text:span text:style-name="Emphasis"><text:span text:style-name="T31">4</text:span></text:span></text:p>
      <text:p text:style-name="P9"><text:s text:c="2"/>на тему «<text:span text:style-name="T26">Разработка руководства пользователя</text:span>».</text:p>
      <text:p text:style-name="P6"/>
      <text:p text:style-name="P10"/>
      <text:p text:style-name="P9"/>
      <text:p text:style-name="P7"/>
      <text:p text:style-name="P11"><text:span text:style-name="T10">Дисциплина: </text:span><text:span text:style-name="T25">Сетевые технологии</text:span></text:p>
      <text:p text:style-name="P12">Группа: <text:span text:style-name="T1">22</text:span>П<text:span text:style-name="T1">Т</text:span>1 </text:p>
      <text:p text:style-name="P13"><text:span text:style-name="T10">Выполнил: </text:span><text:span text:style-name="T25">Мочалин А.А.</text:span></text:p>
      <text:p text:style-name="P14">Количество баллов:</text:p>
      <text:p text:style-name="P14">Дата сдачи:</text:p>
      <text:p text:style-name="P16">Проверил: <text:span text:style-name="T13">ст. преподаватель</text:span></text:p>
      <text:p text:style-name="P18">Щербакова А.<text:span text:style-name="T32">Ю.</text:span></text:p>
      <text:p text:style-name="P6"/>
      <text:p text:style-name="P6"/>
      <text:p text:style-name="P6"/>
      <text:p text:style-name="P6"><text:span text:style-name="T12">Пенза </text:span>20<text:span text:style-name="T6">2</text:span><text:span text:style-name="T23">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ГОСТ_5f_заголовок_5f_раздела_5f_Танасов" style:display-name="ГОСТ_заголовок_раздела_Танасов" style:family="paragraph" style:parent-style-name="Standard" style:master-page-name="">
      <style:paragraph-properties fo:margin-left="0cm" fo:margin-right="0cm" fo:margin-top="0cm" fo:margin-bottom="0.84cm" style:contextual-spacing="false" fo:line-height="150%" fo:text-align="center" style:justify-single-word="false" fo:text-indent="1.251cm" style:auto-text-indent="false" style:page-number="auto" fo:break-before="pag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ГОСТ_5f_заголовок_5f_подраздела_5f_Танасов" style:display-name="ГОСТ_заголовок_подраздела_Танасов" style:family="paragraph" style:parent-style-name="Standard">
      <style:paragraph-properties fo:margin-left="0cm" fo:margin-right="0cm" fo:margin-top="0cm" fo:margin-bottom="0.84cm" style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_5f_рисунок_5f_Танасов" style:display-name="ГОСТ_рисунок_Танасов" style:family="paragraph" style:parent-style-name="ГОСТ_5f_основной_5f_текст_5f_Танасов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ГОСТ_5f_формула_5f_Танасов" style:display-name="ГОСТ_формула_Танасов" style:family="paragraph" style:parent-style-name="ГОСТ_5f_рисунок_5f_Танасов">
      <style:paragraph-properties fo:margin-left="0cm" fo:margin-right="0cm" fo:line-height="100%" fo:text-align="center" style:justify-single-word="false" fo:text-indent="0cm" style:auto-text-indent="false"/>
    </style:style>
    <style:style style:name="ГОСТ_5f_название_5f_таблицы_5f_Танасов" style:display-name="ГОСТ_название_таблицы_Танасов" style:family="paragraph" style:parent-style-name="ГОСТ_5f_рисунок_5f_Танасов" style:master-page-name="">
      <style:paragraph-properties fo:margin-left="0cm" fo:margin-right="0cm" fo:line-height="150%" fo:text-align="start" style:justify-single-word="false" fo:orphans="2" fo:widows="2" fo:text-indent="1.27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ГОСТ_5f_основной_5f_текст_5f_Танасов" style:display-name="ГОСТ_основной_текст_Танасов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ГОСТ_5f_нумерованный_5f_Танасов" style:display-name="ГОСТ_нумерованный_Танасов" style:family="paragraph" style:parent-style-name="ГОСТ_5f_основной_5f_текст_5f_Танасов" style:list-style-name="Numbering_20_123" style:master-page-name="">
      <style:paragraph-properties fo:margin-left="0cm" fo:margin-right="0cm" fo:text-indent="1.251cm" style:auto-text-indent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ГОСТ_5f_Содержимое_5f_таблицы_5f_Танасов" style:display-name="ГОСТ_Содержимое_таблицы_Танасов" style:family="paragraph" style:parent-style-name="ГОСТ_5f_основной_5f_текст_5f_Танасов" style:master-page-name="">
      <style:paragraph-properties fo:margin-left="0cm" fo:margin-right="0cm" fo:line-height="100%" fo:text-align="center" style:justify-single-word="false" fo:orphans="2" fo:widows="2" fo:text-indent="0cm" style:auto-text-indent="false" style:page-number="auto">
        <style:tab-stops/>
      </style:paragraph-properties>
      <style:text-properties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ГОСТ_5f_текст_5f_программ_5f_Танасов" style:display-name="ГОСТ_текст_программ_Танасов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Drop_20_Caps" style:display-name="Drop Caps" style:family="text"/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1cm"/>
        </style:list-level-properties>
      </text:list-level-style-number>
    </text:list-style>
    <text:list-style style:name="ГОСТ_5f_многоуровневый_5f_Танасов" style:display-name="ГОСТ_многоуровневый_Танасов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1.231cm" fo:margin-left="0.01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формулы_5f_Танасов" style:display-name="ГОСТ_номер_формулы_Танасов">
      <text:list-level-style-number text:level="1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nothing" fo:text-indent="1.251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таблицы_5f_Танасов" style:display-name="ГОСТ_номер_таблицы_Танасов" text:consecutive-numbering="true">
      <text:list-level-style-number text:level="1" loext:num-list-format="Таблица%1% -" style:num-prefix="Таблица" style:num-suffix=" -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Таблица%2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Таблица%3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Таблица%4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Таблица%5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Таблица%6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Таблица%7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Таблица%8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Таблица%9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Таблица%10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е_5f_Танасов" style:display-name="ГОСТ_перечисление_Танасов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а, б, .., аа, бб, ... (ru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рисунка_5f_Танасов" style:display-name="ГОСТ_номер_рисунка_Танасов">
      <text:list-level-style-number text:level="1" loext:num-list-format="Рисунок %1% -" style:num-prefix="Рисунок " style:num-suffix=" -" style:num-format="1">
        <style:list-level-properties text:list-level-position-and-space-mode="label-alignment" fo:text-align="center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маркированный_5f_список_5f_Танасов" style:display-name="ГОСТ_маркированный_список_Танасов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−">
        <style:list-level-properties text:list-level-position-and-space-mode="label-alignment">
          <style:list-level-label-alignment text:label-followed-by="space" fo:text-indent="-0.654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−">
        <style:list-level-properties text:list-level-position-and-space-mode="label-alignment">
          <style:list-level-label-alignment text:label-followed-by="space" fo:text-indent="-1.289cm" fo:margin-left="2.54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−">
        <style:list-level-properties text:list-level-position-and-space-mode="label-alignment">
          <style:list-level-label-alignment text:label-followed-by="space" fo:text-indent="-1.924cm" fo:margin-left="3.175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−">
        <style:list-level-properties text:list-level-position-and-space-mode="label-alignment">
          <style:list-level-label-alignment text:label-followed-by="space" fo:text-indent="-2.559cm" fo:margin-left="3.8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−">
        <style:list-level-properties text:list-level-position-and-space-mode="label-alignment">
          <style:list-level-label-alignment text:label-followed-by="space" fo:text-indent="-3.194cm" fo:margin-left="4.445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−">
        <style:list-level-properties text:list-level-position-and-space-mode="label-alignment">
          <style:list-level-label-alignment text:label-followed-by="space" fo:text-indent="-3.829cm" fo:margin-left="5.08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−">
        <style:list-level-properties text:list-level-position-and-space-mode="label-alignment">
          <style:list-level-label-alignment text:label-followed-by="space" fo:text-indent="-4.464cm" fo:margin-left="5.715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−">
        <style:list-level-properties text:list-level-position-and-space-mode="label-alignment">
          <style:list-level-label-alignment text:label-followed-by="space" fo:text-indent="-5.099cm" fo:margin-left="6.35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−">
        <style:list-level-properties text:list-level-position-and-space-mode="label-alignment">
          <style:list-level-label-alignment text:label-followed-by="space" fo:text-indent="-5.734cm" fo:margin-left="6.985cm"/>
        </style:list-level-properties>
        <style:text-properties fo:font-family="OpenSymbol" style:font-style-name="Regular" style:font-charset="x-symbol"/>
      </text:list-level-style-bullet>
    </text:list-style>
    <text:list-style style:name="ГОСТ_5f_нумерованный_5f_список_5f_Танасов" style:display-name="ГОСТ_нумерованный_список_Танасов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  <style:text-properties fo:font-family="StarSymbol"/>
      </text:list-level-style-bullet>
    </text:list-style>
    <text:list-style style:name="WWNum1aaaa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 number:title="Особый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0P0"/>
    </number:currency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d6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.1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ГОСТ_5f_страница_5f_Танасов" style:display-name="ГОСТ_страница_Танасов" style:page-layout-name="Mpm2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ГОСТ_5f_Титульная_20_страница_5f_Танасов" style:display-name="ГОСТ_Титульная страница_Танасов" style:page-layout-name="Mpm10" draw:style-name="Mdp1" style:next-style-name="ГОСТ_5f_страница_5f_Танасов"/>
    <style:master-page style:name="_31_23" style:display-name="123" style:page-layout-name="Mpm1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7T20:08:48.021000000</dc:date>
    <meta:editing-duration>P1DT10H55M50S</meta:editing-duration>
    <meta:editing-cycles>586</meta:editing-cycles>
    <meta:generator>LibreOffice/7.2.1.2$Windows_X86_64 LibreOffice_project/87b77fad49947c1441b67c559c339af8f3517e22</meta:generator>
    <meta:initial-creator>Sonne</meta:initial-creator>
    <meta:creation-date>2017-11-13T13:48:00</meta:creation-date>
    <meta:print-date>2025-09-24T08:40:02.747000000</meta:print-date>
    <meta:printed-by>Файлы PDF</meta:printed-by>
    <meta:document-statistic meta:table-count="0" meta:image-count="0" meta:object-count="0" meta:page-count="1" meta:paragraph-count="15" meta:word-count="48" meta:character-count="396" meta:non-whitespace-character-count="357"/>
  </office:meta>
</office:document-meta>
</file>