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officeooo:paragraph-rsid="00090a3a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officeooo:paragraph-rsid="00061c1f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paragraph-rsid="00061c1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paragraph-rsid="00090a3a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paragraph-rsid="000710d5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paragraph-rsid="00077fd3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officeooo:paragraph-rsid="000710d5"/>
    </style:style>
    <style:style style:name="P10" style:family="paragraph" style:parent-style-name="Text_20_body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officeooo:paragraph-rsid="00090a3a"/>
    </style:style>
    <style:style style:name="P11" style:family="paragraph" style:parent-style-name="Text_20_body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officeooo:paragraph-rsid="000924e1"/>
    </style:style>
    <style:style style:name="P12" style:family="paragraph" style:parent-style-name="Text_20_body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paragraph-rsid="00090a3a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paragraph-rsid="00001078" style:font-size-asian="14pt" style:font-size-complex="14pt"/>
    </style:style>
    <style:style style:name="P14" style:family="paragraph" style:parent-style-name="Text_20_body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fo:font-size="14pt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Text_20_body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officeooo:paragraph-rsid="00090a3a"/>
    </style:style>
    <style:style style:name="P17" style:family="paragraph" style:parent-style-name="Text_20_body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43553"/>
    </style:style>
    <style:style style:name="T3" style:family="text">
      <style:text-properties officeooo:rsid="00061c1f"/>
    </style:style>
    <style:style style:name="T4" style:family="text">
      <style:text-properties fo:language="en" fo:country="US" officeooo:rsid="00061c1f"/>
    </style:style>
    <style:style style:name="T5" style:family="text">
      <style:text-properties fo:language="ru" fo:country="RU" officeooo:rsid="00061c1f"/>
    </style:style>
    <style:style style:name="T6" style:family="text">
      <style:text-properties fo:language="ru" fo:country="RU" officeooo:rsid="0006399e"/>
    </style:style>
    <style:style style:name="T7" style:family="text">
      <style:text-properties officeooo:rsid="000710d5"/>
    </style:style>
    <style:style style:name="T8" style:family="text">
      <style:text-properties officeooo:rsid="00077fd3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710d5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officeooo:rsid="0006399e" style:font-size-asian="14pt" style:font-size-complex="14pt"/>
    </style:style>
    <style:style style:name="T13" style:family="text">
      <style:text-properties officeooo:rsid="000960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Хочу показать доклад о</text:span> курсовой работы <text:span text:style-name="T2">по теме</text:span> «Разработка приложений с сетевым взаимодействием» по дисциплине «Сетевые технологии».</text:p>
      <text:p text:style-name="P10"><text:span text:style-name="Strong_20_Emphasis"><text:span text:style-name="T11">Цель и задачи.</text:span></text:span><text:span text:style-name="T9"> </text:span></text:p>
      <text:p text:style-name="P12">Целью работы являлась разработка сетевого приложения с архитектурой клиент-сервер. </text:p>
      <text:p text:style-name="P13">В рамках работы были поставлены четыре задачи: разработать протокол прикладного уровня, программно реализовать приложение, проверить его работоспособность и разработать руководство пользователя.</text:p>
      <text:p text:style-name="P2"><text:span text:style-name="Strong_20_Emphasis"><text:span text:style-name="T11">Протокол прикладного уровня.</text:span></text:span><text:span text:style-name="T9"> </text:span></text:p>
      <text:p text:style-name="P3"/>
      <text:p text:style-name="P3">Разработанный протокол использует бинарный формат пакетов. Первый байт каждого сообщения — это <text:span text:style-name="T3">идентификатор типа сообщения</text:span>, который сообщает серверу, как обрабатывать полученные данные. </text:p>
      <text:p text:style-name="P3">Перед началом работы клиент обязан пройти аутентификацию. После успешного входа клиент может передавать файлы: сначала отправляются метаданные — имя и размер файла, затем он разбивается на сегменты и передаётся по частям, после чего отправляется сигнал завершения. </text:p>
      <text:p text:style-name="P8"/>
      <text:p text:style-name="P1"><text:span text:style-name="Strong_20_Emphasis"><text:span text:style-name="T11">Программная реализация.</text:span></text:span><text:span text:style-name="T9"> </text:span></text:p>
      <text:p text:style-name="P5"/>
      <text:p text:style-name="P5">Приложение реализовано в виде клиент-серверной системы. Сервер написан на Node.js с использованием TypeScript и WebSocket. TypeScript помогает находить ошибки ещё до запуска программы, что делает код надёжнее. WebSocket <text:span text:style-name="T3">в отличии от </text:span><text:span text:style-name="T4">http </text:span><text:span text:style-name="T5">позволяет устанавливать соединение один раз и держать его открытым на всё время передачи файла. </text:span></text:p>
      <text:p text:style-name="P5"><text:span text:style-name="T5"/></text:p>
      <text:p text:style-name="P9"><text:span text:style-name="T12">К</text:span><text:span text:style-name="T9">лиентская часть </text:span><text:span text:style-name="T10">была реализована с помощью</text:span><text:span text:style-name="T9"> React. </text:span><text:span text:style-name="Strong_20_Emphasis"><text:span text:style-name="T11">React</text:span></text:span><text:span text:style-name="T9"> — это библиотека для построения пользовательского интерфейса. С её помощью реализована визуальная часть приложения — страница входа, форма загрузки файлов и панель администратора. </text:span></text:p>
      <text:p text:style-name="P6"/>
      <text:p text:style-name="P7"><text:span text:style-name="T7">Все д</text:span>анные хранятся в базе SQLite, аутентификация выполняется через <text:span text:style-name="T8">специальный токен, </text:span>который сервер выдаёт клиенту после успешного входа. </text:p>
      <text:p text:style-name="P8"/>
      <text:p text:style-name="P10"><text:span text:style-name="Strong_20_Emphasis"><text:span text:style-name="T11">Проверка работоспособности.</text:span></text:span><text:span text:style-name="T9"> </text:span></text:p>
      <text:p text:style-name="P16"><text:span text:style-name="Strong_20_Emphasis"><text:span text:style-name="T11">Работоспособность приложения была проверена с помощью Wireshark.</text:span></text:span><text:span text:style-name="T9"> Анализ TCP-потока подтвердил корректную передачу бинарных пакетов — загрузка и скачивание файлов выполняются без ошибок, все пакеты логируются </text:span><text:soft-page-break/><text:span text:style-name="T9">в базе данных. </text:span></text:p>
      <text:p text:style-name="P11"><text:span text:style-name="Strong_20_Emphasis"><text:span text:style-name="T11">Руководство пользователя</text:span></text:span></text:p>
      <text:p text:style-name="P17"><text:span text:style-name="Strong_20_Emphasis"><text:span text:style-name="T11">Руководство пользователя</text:span></text:span><text:span text:style-name="T9"> описывает процесс входа в систему, загрузки файлов и работы с панелью администратора.</text:span></text:p>
      <text:p text:style-name="P15"><text:span text:style-name="T13">Таким образом, в</text:span>се поставленные задачи выполнены в полном объёме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9T16:10:57.836000000</dc:date>
    <meta:editing-duration>PT15M21S</meta:editing-duration>
    <meta:editing-cycles>11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16" meta:word-count="258" meta:character-count="2090" meta:non-whitespace-character-count="1832"/>
  </office:meta>
</office:document-meta>
</file>